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style="italic" style:font-style-asian="italic" style:font-style-complex="italic"/>
    </style:style>
    <style:style style:name="P4" style:parent-style-name="Normal" style:family="paragraph">
      <style:text-properties fo:font-style="italic" style:font-style-asian="italic" style:font-style-complex="italic"/>
    </style:style>
    <style:style style:name="P5" style:parent-style-name="Normal" style:family="paragraph">
      <style:text-properties fo:font-style="italic" style:font-style-asian="italic" style:font-style-complex="italic"/>
    </style:style>
    <style:style style:name="P6" style:parent-style-name="Normal" style:family="paragraph">
      <style:text-properties fo:font-style="italic" style:font-style-asian="italic" style:font-style-complex="italic"/>
    </style:style>
    <style:style style:name="P7" style:parent-style-name="Normal" style:family="paragraph">
      <style:text-properties fo:font-style="italic" style:font-style-asian="italic" style:font-style-complex="italic"/>
    </style:style>
    <style:style style:name="P8" style:parent-style-name="Normal" style:family="paragraph">
      <style:text-properties fo:font-style="italic" style:font-style-asian="italic" style:font-style-complex="italic"/>
    </style:style>
    <style:style style:name="P9" style:parent-style-name="Normal" style:family="paragraph">
      <style:text-properties fo:font-style="italic" style:font-style-asian="italic" style:font-style-complex="italic"/>
    </style:style>
    <style:style style:name="P10" style:parent-style-name="Normal" style:family="paragraph">
      <style:text-properties fo:font-style="italic" style:font-style-asian="italic" style:font-style-complex="italic"/>
    </style:style>
    <style:style style:name="P11" style:parent-style-name="Normal" style:family="paragraph">
      <style:text-properties fo:font-style="italic" style:font-style-asian="italic" style:font-style-complex="italic"/>
    </style:style>
    <style:style style:name="P12" style:parent-style-name="Normal" style:family="paragraph">
      <style:text-properties fo:font-style="italic" style:font-style-asian="italic" style:font-style-complex="italic"/>
    </style:style>
  </office:automatic-styles>
  <office:body>
    <office:text text:use-soft-page-breaks="true">
      <text:p text:style-name="P1">Mazare Bianca-Nicole</text:p>
      <text:p text:style-name="Normal"/>
      <text:p text:style-name="P2">Creating a prompt using the concepts learned in the Prompt Engineering presentation:</text:p>
      <text:p text:style-name="P3">Role</text:p>
      <text:p text:style-name="Normal">You are an experienced technical writer and AI tutor specializing in explaining complex topics to beginners.</text:p>
      <text:p text:style-name="Normal"/>
      <text:p text:style-name="P4">Instruction</text:p>
      <text:p text:style-name="Normal">Write a beginner-friendly explanation of the concept of cloud computing.</text:p>
      <text:p text:style-name="Normal"/>
      <text:p text:style-name="P5">Context</text:p>
      <text:p text:style-name="Normal">The audience consists of first-year university students with little or no prior knowledge of cloud computing. The goal is to help them understand the basic idea, common service models, and real-world applications.</text:p>
      <text:p text:style-name="Normal"/>
      <text:p text:style-name="P6">Examples</text:p>
      <text:p text:style-name="Normal">Example 1:</text:p>
      <text:p text:style-name="Normal">Question: What is artificial intelligence?</text:p>
      <text:p text:style-name="Normal">Answer: Artificial intelligence is the ability of computers to perform tasks that normally require human intelligence, such as recognizing images or understanding language.</text:p>
      <text:p text:style-name="P7"/>
      <text:p text:style-name="P8">Example 2:</text:p>
      <text:p text:style-name="Normal">Question: What is the Internet of Things?</text:p>
      <text:p text:style-name="Normal">Answer: The Internet of Things (IoT) refers to physical devices connected to the internet that can collect and exchange data, such as smart thermostats or fitness trackers.</text:p>
      <text:p text:style-name="Normal"/>
      <text:p text:style-name="Normal"/>
      <text:soft-page-break/>
      <text:p text:style-name="P9">Reasoning</text:p>
      <text:p text:style-name="Normal">Before writing the final answer, think step by step about:</text:p>
      <text:p text:style-name="Normal">1. What cloud computing is.</text:p>
      <text:p text:style-name="Normal">2. Why it is useful.</text:p>
      <text:p text:style-name="Normal">3. The three main service models (IaaS, PaaS, SaaS).</text:p>
      <text:p text:style-name="Normal">4. Two real-world examples.</text:p>
      <text:p text:style-name="Normal">Then produce the final explanation.</text:p>
      <text:p text:style-name="P10"/>
      <text:p text:style-name="P11">Tools</text:p>
      <text:p text:style-name="Normal">If available, use a reliable web search tool to verify that the examples and terminology are current before generating the response.</text:p>
      <text:p text:style-name="Normal"/>
      <text:p text:style-name="P12">Constraints</text:p>
      <text:p text:style-name="Normal">- Tone: Friendly and educational.</text:p>
      <text:p text:style-name="Normal">- Length: 250–300 words.</text:p>
      <text:p text:style-name="Normal">- Format:</text:p>
      <text:p text:style-name="Normal"><text:s text:c="2"/>- Definition</text:p>
      <text:p text:style-name="Normal"><text:s text:c="2"/>- Benefits</text:p>
      <text:p text:style-name="Normal"><text:s text:c="2"/>- Service Models (bullet list)</text:p>
      <text:p text:style-name="Normal"><text:s text:c="2"/>- Real-world Examples</text:p>
      <text:p text:style-name="Normal"><text:s text:c="2"/>- Short Summary</text:p>
      <text:p text:style-name="Normal">- Avoid technical jargon unless you define it.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ianca Mazare</meta:initial-creator>
    <dc:creator>Bianca Mazare</dc:creator>
    <meta:creation-date>2026-07-06T07:45:00Z</meta:creation-date>
    <dc:date>2026-07-06T07:52:00Z</dc:date>
    <meta:template xlink:href="Normal" xlink:type="simple"/>
    <meta:editing-cycles>1</meta:editing-cycles>
    <meta:editing-duration>PT240S</meta:editing-duration>
    <meta:document-statistic meta:page-count="2" meta:paragraph-count="3" meta:word-count="239" meta:character-count="1602" meta:row-count="11" meta:non-whitespace-character-count="1366"/>
  </office:meta>
</office:document-meta>
</file>